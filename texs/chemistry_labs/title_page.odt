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egular Nerd Font" svg:font-family="'Regular Nerd Font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officeooo:rsid="0011dc28" officeooo:paragraph-rsid="0011dc28"/>
    </style:style>
    <style:style style:name="P4" style:family="paragraph" style:parent-style-name="Standard">
      <style:paragraph-properties>
        <style:tab-stops>
          <style:tab-stop style:position="3.6083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6" style:family="paragraph" style:parent-style-name="Standard">
      <style:paragraph-properties fo:text-align="end" style:justify-single-word="false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officeooo:rsid="0014df2f" style:font-size-asian="14pt" style:font-name-complex="Times New Roman1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Times New Roman" fo:font-size="16pt" officeooo:rsid="00107122" style:font-size-asian="16pt" style:font-name-complex="Times New Roman1" style:font-size-complex="16pt"/>
    </style:style>
    <style:style style:name="T5" style:family="text">
      <style:text-properties style:font-name="Times New Roman" fo:font-size="16pt" officeooo:rsid="001287a9" style:font-size-asian="16pt" style:font-name-complex="Times New Roman1" style:font-size-complex="16pt"/>
    </style:style>
    <style:style style:name="T6" style:family="text">
      <style:text-properties style:font-name="Times New Roman" fo:font-size="16pt" officeooo:rsid="0011dc28" style:font-size-asian="16pt" style:font-name-complex="Times New Roman1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анкт-Петербургский Политехнический университет Петра Великого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Лабораторная работа №</text:span><text:span text:style-name="T2">8</text:span></text:p>
      <text:p text:style-name="P3" loext:marker-style-name="T3"><text:span text:style-name="T3">КОРРОЗИЯ МЕТАЛЛОВ В РАСТВОРАХ КИСЛОТ</text:span></text:p>
      <text:p text:style-name="P4" loext:marker-style-name="T3"><text:span text:style-name="T3"><text:tab/></text:span><text:span text:style-name="T3"/></text:p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6" loext:marker-style-name="T3"><text:span text:style-name="T3">Студент: </text:span><text:span text:style-name="T4">Куликовских И.М.</text:span></text:p>
      <text:p text:style-name="P6" loext:marker-style-name="T3"><text:span text:style-name="T3">группа: 5030302/30801</text:span><text:span text:style-name="T3"/></text:p>
      <text:p text:style-name="P6" loext:marker-style-name="T3"><text:span text:style-name="T3">Преподаватель: Крылов Н.И</text:span></text:p>
      <text:p text:style-name="P5" loext:marker-style-name="T3"/>
      <text:p text:style-name="P5" loext:marker-style-name="T3"/>
      <text:p text:style-name="P1" loext:marker-style-name="T3"><text:span text:style-name="T3">дата сдачи: </text:span><text:span text:style-name="T5">25</text:span><text:span text:style-name="T3">.</text:span><text:span text:style-name="T6">12</text:span><text:span text:style-name="T3">.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egular Nerd Font" svg:font-family="'Regular Nerd Font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Regular Nerd Font" style:font-family-asian="'Regular Nerd Fon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ser</meta:initial-creator>
    <meta:editing-cycles>7</meta:editing-cycles>
    <meta:creation-date>2025-10-21T17:20:00</meta:creation-date>
    <dc:date>2025-12-25T05:52:47.824755128</dc:date>
    <meta:editing-duration>PT31M9S</meta:editing-duration>
    <meta:generator>LibreOffice/25.8.4.2$Linux_X86_64 LibreOffice_project/580$Build-2</meta:generator>
    <meta:print-date>2025-12-25T05:14:39.470779447</meta:print-date>
    <meta:printed-by>PDF files</meta:printed-by>
    <meta:document-statistic meta:table-count="0" meta:image-count="0" meta:object-count="0" meta:page-count="1" meta:paragraph-count="8" meta:word-count="24" meta:character-count="214" meta:non-whitespace-character-count="196"/>
    <meta:user-defined meta:name="AppVersion">16.0000</meta:user-defined>
    <meta:template xlink:type="simple" xlink:actuate="onRequest" xlink:title="Normal.dotm" xlink:href=""/>
  </office:meta>
</office:document-meta>
</file>